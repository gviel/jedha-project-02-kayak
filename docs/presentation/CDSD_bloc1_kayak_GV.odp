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6C00000021098CC7703AA091F68.png" manifest:media-type="image/png"/>
  <manifest:file-entry manifest:full-path="Pictures/10000201000006B100000258EE9AB27FD7845639.png" manifest:media-type="image/png"/>
  <manifest:file-entry manifest:full-path="Pictures/TablePreview1.svm" manifest:media-type=""/>
  <manifest:file-entry manifest:full-path="Pictures/100002010000037E000000D7AB789E1D778A2B7C.png" manifest:media-type="image/png"/>
  <manifest:file-entry manifest:full-path="Pictures/100002010000008D000000609DFC021226D1E325.png" manifest:media-type="image/png"/>
  <manifest:file-entry manifest:full-path="Pictures/10000201000002EF000000A1DAF72F96F9A9709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Roboto" svg:font-family="Roboto"/>
    <style:font-face style:name="Roboto Light" svg:font-family="'Roboto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741b47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solid" draw:fill-color="#ffffff" draw:opacity="21%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.026cm" svg:stroke-color="#595959" draw:stroke-linejoin="round" draw:fill="solid" draw:fill-color="#a64d7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45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solid" draw:fill-color="#d8372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none" svg:stroke-width="0cm" draw:fill="solid" draw:fill-color="#801f1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none" svg:stroke-width="0cm" draw:fill="solid" draw:fill-color="#b02b2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5.027cm" style:use-optimal-column-width="false"/>
    </style:style>
    <style:style style:name="ro1" style:family="table-row">
      <style:table-row-properties style:row-height="1.062cm"/>
    </style:style>
    <style:style style:name="ce1" style:family="table-cell">
      <loext:graphic-properties draw:fill="solid" draw:fill-color="#efefef" draw:textarea-vertical-align="top" fo:padding-top="0.253cm" fo:padding-bottom="0.253cm" fo:padding-left="0.253cm" fo:padding-right="0.253cm"/>
      <style:paragraph-properties fo:border="0.37pt solid #9e9e9e"/>
    </style:style>
    <style:style style:name="ce2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ce3" style:family="table-cell">
      <loext:graphic-properties draw:fill="solid" draw:fill-color="#b7b7b7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solid" draw:fill-color="#ffffff" draw:opacity="21%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solid" draw:fill-color="#a64d79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solid" draw:fill-color="#d83729"/>
      <style:paragraph-properties fo:text-align="start" style:font-independent-line-spacing="true"/>
      <style:text-properties fo:font-size="14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loext:graphic-properties draw:fill="solid" draw:fill-color="#801f17"/>
      <style:paragraph-properties fo:text-align="start" style:font-independent-line-spacing="true"/>
      <style:text-properties fo:font-size="14pt"/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solid" draw:fill-color="#b02b20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 Light" fo:font-size="30pt" fo:letter-spacing="normal" fo:font-style="normal" style:text-underline-style="none" fo:font-weight="normal" style:font-name-asian="Roboto Light" style:font-size-asian="30pt" style:font-style-asian="normal" style:font-weight-asian="normal" style:font-name-complex="Roboto Light" style:font-size-complex="3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23pt" fo:letter-spacing="normal" fo:font-style="normal" style:text-underline-style="none" fo:font-weight="normal" style:font-name-asian="Arial" style:font-size-asian="23pt" style:font-style-asian="normal" style:font-weight-asian="normal" style:font-name-complex="Arial" style:font-size-complex="23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 Light" fo:font-size="16pt" fo:letter-spacing="normal" fo:font-style="normal" style:text-underline-style="none" fo:font-weight="normal" style:font-name-asian="Roboto Light" style:font-size-asian="16pt" style:font-style-asian="normal" style:font-weight-asian="normal" style:font-name-complex="Roboto Light" style:font-size-complex="1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Roboto Light" fo:font-size="24pt" fo:letter-spacing="normal" fo:font-style="normal" style:text-underline-style="none" fo:font-weight="normal" style:font-name-asian="Roboto Light" style:font-size-asian="24pt" style:font-style-asian="normal" style:font-weight-asian="normal" style:font-name-complex="Roboto Light" style:font-size-complex="24pt" style:font-style-complex="normal" style:font-weight-complex="normal"/>
    </style:style>
    <style:style style:name="T7" style:family="text">
      <style:text-properties fo:font-variant="normal" fo:text-transform="none" fo:color="#134f5c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Calibri" style:font-size-asian="18pt" style:font-style-asian="normal" style:font-weight-asian="bold" style:font-name-complex="Calibri" style:font-size-complex="18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alibri" fo:font-size="10pt" fo:letter-spacing="normal" fo:font-style="normal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1" style:family="text">
      <style:text-properties fo:font-variant="normal" fo:text-transform="none" fo:color="#0097a7" style:text-line-through-style="none" style:text-line-through-type="none" style:text-position="0% 100%" style:font-name="Calibri" fo:font-size="18pt" fo:letter-spacing="normal" fo:font-style="normal" style:text-underline-style="solid" style:text-underline-width="auto" style:text-underline-color="font-color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Roboto" fo:font-size="12pt" fo:letter-spacing="normal" fo:font-style="normal" style:text-underline-style="none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Roboto" fo:font-size="12pt" fo:letter-spacing="normal" fo:font-style="normal" style:text-underline-style="none" fo:font-weight="bold" style:font-name-asian="Roboto" style:font-size-asian="12pt" style:font-style-asian="normal" style:font-weight-asian="bold" style:font-name-complex="Roboto" style:font-size-complex="12pt" style:font-style-complex="normal" style:font-weight-complex="bold"/>
    </style:style>
    <style:style style:name="T17" style:family="text">
      <style:text-properties fo:font-variant="normal" fo:text-transform="none" fo:color="#595959" style:text-line-through-style="none" style:text-line-through-type="none" style:text-position="0% 100%" style:font-name="Calibri" fo:font-size="12pt" fo:letter-spacing="normal" fo:font-style="normal" style:text-underline-style="none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18" style:family="text">
      <style:text-properties fo:font-variant="normal" fo:text-transform="none" fo:color="#595959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19" style:family="text">
      <style:text-properties fo:font-variant="normal" fo:text-transform="none" fo:color="#134f5c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Calibri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Calibri" fo:color="#595959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Calibri" fo:color="#59595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○">
        <style:list-level-properties text:space-before="1.588cm" text:min-label-width="0.952cm"/>
        <style:text-properties style:font-name="Calibri" fo:color="#59595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1.588cm" text:min-label-width="0.952cm"/>
        <style:text-properties style:font-name="Calibri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1.588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18cm" text:min-label-width="0.952cm"/>
        <style:text-properties style:font-name="Calibri" fo:color="#595959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Calibri" fo:color="#595959" fo:font-size="100%"/>
      </text:list-level-style-bullet>
      <text:list-level-style-bullet text:level="3" text:bullet-char="■">
        <style:list-level-properties text:space-before="2.858cm" text:min-label-width="0.952cm"/>
        <style:text-properties style:font-name="Calibri" fo:color="#595959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-">
        <style:list-level-properties text:space-before="0.424cm" text:min-label-width="0.846cm"/>
        <style:text-properties style:font-name="Robot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-">
        <style:list-level-properties text:space-before="0.424cm" text:min-label-width="0.846cm"/>
        <style:text-properties style:font-name="Roboto" fo:color="#000000" fo:font-size="100%"/>
      </text:list-level-style-bullet>
      <text:list-level-style-bullet text:level="2" text:bullet-char="-">
        <style:list-level-properties text:space-before="1.694cm" text:min-label-width="0.846cm"/>
        <style:text-properties style:font-name="Roboto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2" draw:layer="layout" svg:width="23.499cm" svg:height="3.047cm" svg:x="1cm" svg:y="4.448cm">
          <text:p text:style-name="P1"><text:span text:style-name="T1">Bloc 1 : Construction et alimentation </text:span></text:p>
          <text:p text:style-name="P1"><text:span text:style-name="T1">d'une infrastructure de gestion de donné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5;p13" draw:style-name="gr2" draw:text-style-name="P3" draw:layer="layout" svg:width="6.068cm" svg:height="1.3cm" svg:x="13.159cm" svg:y="10.959cm">
          <draw:image xlink:href="Pictures/10000201000002EF000000A1DAF72F96F9A97092.png" xlink:type="simple" xlink:show="embed" xlink:actuate="onLoad">
            <text:p/>
          </draw:image>
        </draw:frame>
        <draw:custom-shape draw:name="Google Shape;56;p13" draw:style-name="gr1" draw:text-style-name="P2" draw:layer="layout" svg:width="15.53cm" svg:height="2.751cm" svg:x="1cm" svg:y="0.536cm">
          <text:p text:style-name="P4"><text:span text:style-name="T1">Jedha - Data Science Fullstack</text:span></text:p>
          <text:p text:style-name="P4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;p13" draw:style-name="gr1" draw:text-style-name="P2" draw:layer="layout" svg:width="23.499cm" svg:height="1.185cm" svg:x="1cm" svg:y="1.922cm">
          <text:p text:style-name="P4"><text:span text:style-name="T3"><text:s/></text:span><text:span text:style-name="T3">Certification CSCD (Concepteur développeur en science des donnée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8;p13" draw:style-name="gr2" draw:text-style-name="P3" draw:layer="layout" svg:width="1.602cm" svg:height="1.09cm" svg:x="22.898cm" svg:y="1cm">
          <draw:image xlink:href="Pictures/100002010000008D000000609DFC021226D1E325.png" xlink:type="simple" xlink:show="embed" xlink:actuate="onLoad">
            <text:p/>
          </draw:image>
        </draw:frame>
        <draw:frame draw:name="Google Shape;59;p13" draw:style-name="gr2" draw:text-style-name="P3" draw:layer="layout" svg:width="5.409cm" svg:height="1.3cm" svg:x="6.061cm" svg:y="10.959cm">
          <draw:image xlink:href="Pictures/100002010000037E000000D7AB789E1D778A2B7C.png" xlink:type="simple" xlink:show="embed" xlink:actuate="onLoad">
            <text:p/>
          </draw:image>
        </draw:frame>
        <draw:custom-shape draw:name="Google Shape;60;p13" draw:style-name="gr3" draw:text-style-name="P3" draw:layer="layout" svg:width="23.496cm" svg:height="0.001cm" svg:x="1.015cm" svg:y="3.1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1;p13" draw:style-name="gr4" draw:text-style-name="P5" draw:layer="layout" svg:width="23.689cm" svg:height="1.571cm" svg:x="0.81cm" svg:y="7.492cm">
          <text:p text:style-name="P1"><text:span text:style-name="T4">Où planifiez vos prochaines vacance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13" draw:style-name="gr5" draw:text-style-name="P2" draw:layer="layout" svg:width="23.689cm" svg:height="0.716cm" svg:x="0.81cm" svg:y="13.178cm">
          <text:p text:style-name="P4"><text:span text:style-name="T5">Guillaume VIEL - 21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;p13" draw:style-name="gr5" draw:text-style-name="P2" draw:layer="layout" svg:width="4.373cm" svg:height="1.197cm" svg:x="9.873cm" svg:y="9.316cm">
          <text:p text:style-name="P4"><text:a xlink:href="https://github.com/gviel/jedha-project-02-kayak" xlink:type="simple">Dépôt Github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6" draw:layer="layout" svg:width="16.933cm" svg:height="9.524cm" svg:x="1.059cm" svg:y="1.905cm" draw:page-number="1" presentation:class="page"/>
          <draw:frame draw:name="Google Shape;52;p:notes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_5f_AND_5f_BODY" presentation:presentation-page-layout-name="AL2T1">
        <draw:custom-shape draw:name="Google Shape;68;p14" draw:style-name="gr7" draw:text-style-name="P7" draw:layer="layout" svg:width="25.402cm" svg:height="1.999cm" svg:x="0cm" svg:y="0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4" draw:style-name="gr8" draw:text-style-name="P2" draw:layer="layout" svg:width="23.484cm" svg:height="1.999cm" svg:x="1.015cm" svg:y="0.007cm">
          <text:p text:style-name="P4"><text:span text:style-name="T6">Contexte et besoins du proj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4" draw:style-name="gr5" draw:text-style-name="P2" draw:layer="layout" svg:width="23.484cm" svg:height="1.495cm" svg:x="1.015cm" svg:y="2.097cm">
          <text:p text:style-name="P4"><text:span text:style-name="T7">Le besoin chez Kaya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;p14" draw:style-name="gr5" draw:text-style-name="P2" draw:layer="layout" svg:width="23.832cm" svg:height="4.117cm" svg:x="0.994cm" svg:y="3.393cm">
          <text:list text:style-name="L2">
            <text:list-item>
              <text:p text:style-name="P8"><text:span text:style-name="T8">Développer une application de recommandation de destinations de vacances basée sur des données réelles afin d'aider les voyageurs à mieux choisir leur prochain séjour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9">70% de leurs clients le demandent</text:span><text:span text:style-name="T9"><text:line-break/></text:span><text:span text:style-name="T9"/></text:p>
                </text:list-item>
              </text:list>
            </text:list-item>
            <text:list-item>
              <text:p text:style-name="P8"><text:span text:style-name="T8">Pour identifier et recommander les meilleures destinations et hébergements à un instant donné, Kayak demande d’utiliser des informations réelles</text:span></text:p>
              <text:list>
                <text:list-item>
                  <text:p text:style-name="P8"><text:span text:style-name="T8">la météo</text:span></text:p>
                </text:list-item>
                <text:list-item>
                  <text:p text:style-name="P8"><text:span text:style-name="T8">les meilleurs hôtels disponibles</text:span></text:p>
                </text:list-item>
              </text:list>
            </text:list-item>
          </text:list>
          <text:p text:style-name="P9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14" draw:style-name="gr7" draw:text-style-name="P7" draw:layer="layout" svg:width="25.402cm" svg:height="0.999cm" svg:x="-0.002cm" svg:y="13.262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4" draw:style-name="gr5" draw:text-style-name="P2" draw:layer="layout" svg:width="23.484cm" svg:height="0.999cm" svg:x="1.015cm" svg:y="13.262cm">
          <text:p text:style-name="P4"><text:span text:style-name="T10">Jedha - Certification CDSD - Bloc 1 - Guillaume VIEL - 21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5;g3ebf453f15a_0_10:notes" draw:style-name="gr6" draw:layer="layout" svg:width="16.932cm" svg:height="9.524cm" svg:x="1.059cm" svg:y="1.905cm" draw:page-number="2" presentation:class="page"/>
          <draw:frame draw:name="Google Shape;66;g3ebf453f15a_0_10:notes" presentation:style-name="pr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5f_AND_5f_BODY" presentation:presentation-page-layout-name="AL2T1">
        <draw:custom-shape draw:name="Google Shape;78;p15" draw:style-name="gr7" draw:text-style-name="P7" draw:layer="layout" svg:width="25.402cm" svg:height="1.999cm" svg:x="0cm" svg:y="0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;p15" draw:style-name="gr8" draw:text-style-name="P2" draw:layer="layout" svg:width="23.484cm" svg:height="1.999cm" svg:x="1.015cm" svg:y="0.007cm">
          <text:p text:style-name="P4"><text:span text:style-name="T6">Objectifs et périmètre du proj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15" draw:style-name="gr5" draw:text-style-name="P2" draw:layer="layout" svg:width="23.484cm" svg:height="1.495cm" svg:x="1.015cm" svg:y="2.097cm">
          <text:p text:style-name="P4"><text:span text:style-name="T7">Objectif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;p15" draw:style-name="gr5" draw:text-style-name="P2" draw:layer="layout" svg:width="23.832cm" svg:height="8.767cm" svg:x="0.841cm" svg:y="3.781cm">
          <text:list text:style-name="L2">
            <text:list-item>
              <text:p text:style-name="P8"><text:span text:style-name="T8">Collecter des données pour chacune des 35 villes destinations :</text:span></text:p>
            </text:list-item>
          </text:list>
          <text:list text:style-name="L5">
            <text:list-item>
              <text:p text:style-name="P8"><text:span text:style-name="T8">données météorologiques avec OpenWeatherMap (OWM) : prévisions à 4j</text:span></text:p>
            </text:list-item>
            <text:list-item>
              <text:p text:style-name="P8"><text:span text:style-name="T8">données sur les hôtels les mieux notés sur Booking.com</text:span><text:span text:style-name="T8"><text:line-break/></text:span><text:span text:style-name="T8"/></text:p>
            </text:list-item>
          </text:list>
          <text:list text:style-name="L2">
            <text:list-item>
              <text:p text:style-name="P8"><text:span text:style-name="T8">Stocker ces données</text:span></text:p>
            </text:list-item>
          </text:list>
          <text:list text:style-name="L5">
            <text:list-item>
              <text:p text:style-name="P8"><text:span text:style-name="T8">dans un </text:span><text:span text:style-name="T9">data lake</text:span></text:p>
            </text:list-item>
            <text:list-item>
              <text:p text:style-name="P8"><text:span text:style-name="T8">les </text:span><text:span text:style-name="T9">extraire</text:span><text:span text:style-name="T8">, </text:span><text:span text:style-name="T9">transformer </text:span><text:span text:style-name="T8">et les </text:span><text:span text:style-name="T9">charger</text:span><text:span text:style-name="T8"> (</text:span><text:span text:style-name="T9">ETL</text:span><text:span text:style-name="T8">) </text:span></text:p>
            </text:list-item>
            <text:list-item>
              <text:p text:style-name="P8"><text:span text:style-name="T8">vers un </text:span><text:span text:style-name="T9">data warehouse</text:span></text:p>
            </text:list-item>
          </text:list>
          <text:p text:style-name="P4"><text:span text:style-name="T9"/></text:p>
          <text:p text:style-name="P4"><text:span text:style-name="T8">Afin de disposer de données exploitables pour l’application de recommand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15" draw:style-name="gr7" draw:text-style-name="P7" draw:layer="layout" svg:width="25.402cm" svg:height="0.999cm" svg:x="-0.002cm" svg:y="13.262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15" draw:style-name="gr5" draw:text-style-name="P2" draw:layer="layout" svg:width="23.484cm" svg:height="0.999cm" svg:x="1.015cm" svg:y="13.262cm">
          <text:p text:style-name="P4"><text:span text:style-name="T10">Jedha - Certification CDSD - Bloc 1 - Guillaume VIEL - 21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5;g3edf06be40a_0_13:notes" draw:style-name="gr6" draw:layer="layout" svg:width="16.932cm" svg:height="9.524cm" svg:x="1.059cm" svg:y="1.905cm" draw:page-number="3" presentation:class="page"/>
          <draw:frame draw:name="Google Shape;76;g3edf06be40a_0_13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>
        <draw:custom-shape draw:name="Google Shape;88;p16" draw:style-name="gr7" draw:text-style-name="P7" draw:layer="layout" svg:width="25.402cm" svg:height="1.999cm" svg:x="0cm" svg:y="0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16" draw:style-name="gr8" draw:text-style-name="P2" draw:layer="layout" svg:width="23.484cm" svg:height="1.999cm" svg:x="1.015cm" svg:y="0.007cm">
          <text:p text:style-name="P4"><text:span text:style-name="T6">Architecture de la solution proposé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16" draw:style-name="gr5" draw:text-style-name="P2" draw:layer="layout" svg:width="23.484cm" svg:height="1.495cm" svg:x="1.015cm" svg:y="1.954cm">
          <text:p text:style-name="P4"><text:span text:style-name="T7">Un pipeline automatisé en 7 étap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16" draw:style-name="gr5" draw:text-style-name="P2" draw:layer="layout" svg:width="23.832cm" svg:height="9.467cm" svg:x="0.841cm" svg:y="3.434cm">
          <text:list text:style-name="L7">
            <text:list-item>
              <text:p text:style-name="P8"><text:span text:style-name="T8">Géocodage Nominatim : coordonnées géo (long., lat.) des 35 villes choisies en config</text:span></text:p>
            </text:list-item>
            <text:list-item>
              <text:p text:style-name="P8"><text:span text:style-name="T8">API OpenWeatherMap : prévisions de J+1 à J+4 (free tier 1000 req/j)</text:span></text:p>
            </text:list-item>
            <text:list-item>
              <text:p text:style-name="P8"><text:span text:style-name="T8">Score météo pondéré (0-100 points): permet le classement des villes destination </text:span></text:p>
            </text:list-item>
            <text:list-item>
              <text:p text:style-name="P8"><text:span text:style-name="T8">Scraping de </text:span><text:span text:style-name="T11"><text:a xlink:href="http://booking.com" xlink:type="simple">Booking.com</text:a></text:span><text:span text:style-name="T8"><text:s/>(avec Playwright) : les 20 premiers hôtels des 5 meilleurs destinations</text:span></text:p>
            </text:list-item>
            <text:list-item>
              <text:p text:style-name="P8"><text:span text:style-name="T8">Upload vers le data lake qui sera un bucket AWS S3</text:span></text:p>
            </text:list-item>
            <text:list-item>
              <text:p text:style-name="P8"><text:span text:style-name="T8">Chargement des données vers un data warehouse : BdD PostgreSQL (Neon)</text:span></text:p>
            </text:list-item>
            <text:list-item>
              <text:p text:style-name="P8"><text:span text:style-name="T8">Dashboard de visualisation interactive (Streamlit)</text:span></text:p>
            </text:list-item>
          </text:list>
          <text:p text:style-name="P4"><text:span text:style-name="T8"/></text:p>
          <text:list text:style-name="L2">
            <text:list-item>
              <text:p text:style-name="P4"><text:span text:style-name="T9">Pipeline est exécuté automatiquement tous les jours à 6h00</text:span></text:p>
            </text:list-item>
            <text:list-item>
              <text:p text:style-name="P4"><text:span text:style-name="T9">Purge locale des fichiers effectuée pour météo et hôtels (pour les X dates précédents ou X jours précédents, X configurable)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16" draw:style-name="gr7" draw:text-style-name="P7" draw:layer="layout" svg:width="25.402cm" svg:height="0.999cm" svg:x="-0.002cm" svg:y="13.262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;p16" draw:style-name="gr5" draw:text-style-name="P2" draw:layer="layout" svg:width="23.484cm" svg:height="0.999cm" svg:x="1.015cm" svg:y="13.262cm">
          <text:p text:style-name="P4"><text:span text:style-name="T10">Jedha - Certification CDSD - Bloc 1 - Guillaume VIEL - 21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5;g3edf06be40a_0_23:notes" draw:style-name="gr6" draw:layer="layout" svg:width="16.932cm" svg:height="9.524cm" svg:x="1.059cm" svg:y="1.905cm" draw:page-number="4" presentation:class="page"/>
          <draw:frame draw:name="Google Shape;86;g3edf06be40a_0_23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_5f_AND_5f_BODY" presentation:presentation-page-layout-name="AL2T1">
        <draw:custom-shape draw:name="Google Shape;98;p17" draw:style-name="gr7" draw:text-style-name="P7" draw:layer="layout" svg:width="25.402cm" svg:height="1.999cm" svg:x="0cm" svg:y="0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17" draw:style-name="gr8" draw:text-style-name="P2" draw:layer="layout" svg:width="23.484cm" svg:height="1.999cm" svg:x="1.015cm" svg:y="0.007cm">
          <text:p text:style-name="P4"><text:span text:style-name="T6">Choix des données (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17" draw:style-name="gr9" draw:text-style-name="P2" draw:layer="layout" svg:width="23.484cm" svg:height="0.417cm" svg:x="1.015cm" svg:y="1.852cm">
          <text:p text:style-name="P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17" draw:style-name="gr5" draw:text-style-name="P2" draw:layer="layout" svg:width="23.832cm" svg:height="10.74cm" svg:x="0.841cm" svg:y="2.269cm">
          <text:p text:style-name="P4"><text:span text:style-name="T9">Nominatim</text:span></text:p>
          <text:list text:style-name="L2">
            <text:list-item>
              <text:p text:style-name="P4"><text:span text:style-name="T8">longitude, latitude</text:span></text:p>
            </text:list-item>
            <text:list-item>
              <text:p text:style-name="P4"><text:span text:style-name="T8">le nom de ville tel que le propose Nominatim (utile pour former l’adresse de l’hôtel)</text:span></text:p>
            </text:list-item>
          </text:list>
          <text:p text:style-name="P4"><text:span text:style-name="T8"/></text:p>
          <text:p text:style-name="P4"><text:span text:style-name="T9">OpenWeatherMap</text:span></text:p>
          <text:list text:continue-numbering="true" text:style-name="L2">
            <text:list-item>
              <text:p text:style-name="P4"><text:span text:style-name="T8">date du jour et heure (8 créneaux de 3h)</text:span></text:p>
            </text:list-item>
            <text:list-item>
              <text:p text:style-name="P4"><text:span text:style-name="T8">température, température ressentie, temp. min et max en degrés</text:span></text:p>
            </text:list-item>
            <text:list-item>
              <text:p text:style-name="P4"><text:span text:style-name="T8">pression atmosphérique (mmHg)</text:span></text:p>
            </text:list-item>
            <text:list-item>
              <text:p text:style-name="P4"><text:span text:style-name="T8">% humidité, % couverture nuageuse, vitesse du vent (km/h)</text:span></text:p>
            </text:list-item>
            <text:list-item>
              <text:p text:style-name="P4"><text:span text:style-name="T8">probabilité d’avoir de la pluie (%)</text:span></text:p>
            </text:list-item>
          </text:list>
          <text:p text:style-name="P4"><text:span text:style-name="T8"/></text:p>
          <text:p text:style-name="P4"><text:span text:style-name="T9">Booking.com</text:span></text:p>
          <text:list text:continue-numbering="true" text:style-name="L2">
            <text:list-item>
              <text:p text:style-name="P4"><text:span text:style-name="T8">nom de l’hôtel, lat.+long., description, note, URL booking, address, ville, code postal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17" draw:style-name="gr7" draw:text-style-name="P7" draw:layer="layout" svg:width="25.402cm" svg:height="0.999cm" svg:x="-0.002cm" svg:y="13.262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17" draw:style-name="gr5" draw:text-style-name="P2" draw:layer="layout" svg:width="23.484cm" svg:height="0.999cm" svg:x="1.015cm" svg:y="13.262cm">
          <text:p text:style-name="P4"><text:span text:style-name="T10">Jedha - Certification CDSD - Bloc 1 - Guillaume VIEL - 21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5;g3edf06be40a_0_296:notes" draw:style-name="gr6" draw:layer="layout" svg:width="16.932cm" svg:height="9.524cm" svg:x="1.059cm" svg:y="1.905cm" draw:page-number="5" presentation:class="page"/>
          <draw:frame draw:name="Google Shape;96;g3edf06be40a_0_296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_5f_AND_5f_BODY" presentation:presentation-page-layout-name="AL2T1">
        <draw:custom-shape draw:name="Google Shape;108;p18" draw:style-name="gr7" draw:text-style-name="P7" draw:layer="layout" svg:width="25.402cm" svg:height="1.999cm" svg:x="0cm" svg:y="0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18" draw:style-name="gr8" draw:text-style-name="P2" draw:layer="layout" svg:width="23.484cm" svg:height="1.999cm" svg:x="1.015cm" svg:y="0.007cm">
          <text:p text:style-name="P4"><text:span text:style-name="T6">Choix des données (2) : modèle de scoring mété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18" draw:style-name="gr9" draw:text-style-name="P2" draw:layer="layout" svg:width="23.484cm" svg:height="0.417cm" svg:x="1.015cm" svg:y="1.852cm">
          <text:p text:style-name="P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18" draw:style-name="gr5" draw:text-style-name="P2" draw:layer="layout" svg:width="23.832cm" svg:height="11.118cm" svg:x="0.841cm" svg:y="2.269cm">
          <text:p text:style-name="P4"><text:span text:style-name="T9">Scoring fondé sur le Tourism Climatic Index de Mieczkowski</text:span><text:span text:style-name="T8"> :</text:span></text:p>
          <text:list text:style-name="L2">
            <text:list-item>
              <text:p text:style-name="P4"><text:span text:style-name="T9">score composite 0–100</text:span><text:span text:style-name="T8"> fondé sur les 6 critères météo retenus (créneaux 08h–20h)</text:span></text:p>
            </text:list-item>
            <text:list-item>
              <text:p text:style-name="P4"><text:span text:style-name="T9">classification par tranche</text:span><text:span text:style-name="T8"> des valeurs de météo retenues. Exemples :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8">temp. &lt;0° = très froid =&gt; score 0/10, de 18 à 28° = idéal =&gt; 10/10, &gt;33°=&gt; 0/10</text:span></text:p>
                </text:list-item>
                <text:list-item>
                  <text:p text:style-name="P4"><text:span text:style-name="T8">proba pluie : score = (1-rain_proba)x100, etc.</text:span></text:p>
                </text:list-item>
              </text:list>
            </text:list-item>
            <text:list-item>
              <text:p text:style-name="P4"><text:span text:style-name="T8">pour chaque jour de prévision : moyenne des valeurs de 8-20h puis </text:span><text:span text:style-name="T9">score pondéré</text:span></text:p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4"><text:span text:style-name="T8">Température ressentie 30%</text:span></text:p>
                    </text:list-item>
                    <text:list-item>
                      <text:p text:style-name="P4"><text:span text:style-name="T8">Probabilité de pluie 30%</text:span></text:p>
                    </text:list-item>
                    <text:list-item>
                      <text:p text:style-name="P4"><text:span text:style-name="T8">Vitesse du vent 15%</text:span></text:p>
                    </text:list-item>
                    <text:list-item>
                      <text:p text:style-name="P4"><text:span text:style-name="T8">Couverture nuageuse 10%</text:span></text:p>
                    </text:list-item>
                    <text:list-item>
                      <text:p text:style-name="P4"><text:span text:style-name="T8">Humidité 10%</text:span></text:p>
                    </text:list-item>
                    <text:list-item>
                      <text:p text:style-name="P4"><text:span text:style-name="T8">Pression atmosphérique 5%</text:span></text:p>
                    </text:list-item>
                  </text:list>
                </text:list-item>
              </text:list>
            </text:list-item>
            <text:list-item>
              <text:p text:style-name="P4"><text:span text:style-name="T9">score final = moyenne des 4j + pénalité de variabilité météo</text:span><text:span text:style-name="T8"> : -10 pts si min ou max dépasse mean ± 3σ (jusqu'à -20 pts au total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;p18" draw:style-name="gr7" draw:text-style-name="P7" draw:layer="layout" svg:width="25.402cm" svg:height="0.999cm" svg:x="-0.002cm" svg:y="13.262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18" draw:style-name="gr5" draw:text-style-name="P2" draw:layer="layout" svg:width="23.484cm" svg:height="0.999cm" svg:x="1.015cm" svg:y="13.262cm">
          <text:p text:style-name="P4"><text:span text:style-name="T10">Jedha - Certification CDSD - Bloc 1 - Guillaume VIEL - 21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5;g3edf06be40a_0_310:notes" draw:style-name="gr6" draw:layer="layout" svg:width="16.932cm" svg:height="9.524cm" svg:x="1.059cm" svg:y="1.905cm" draw:page-number="6" presentation:class="page"/>
          <draw:frame draw:name="Google Shape;106;g3edf06be40a_0_310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LE_5f_AND_5f_BODY" presentation:presentation-page-layout-name="AL2T1">
        <draw:custom-shape draw:name="Google Shape;118;p19" draw:style-name="gr7" draw:text-style-name="P7" draw:layer="layout" svg:width="25.402cm" svg:height="1.999cm" svg:x="0cm" svg:y="0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19" draw:style-name="gr8" draw:text-style-name="P2" draw:layer="layout" svg:width="23.484cm" svg:height="1.999cm" svg:x="1.015cm" svg:y="0.007cm">
          <text:p text:style-name="P4"><text:span text:style-name="T6">Pipeline data : robustes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19" draw:style-name="gr9" draw:text-style-name="P2" draw:layer="layout" svg:width="23.484cm" svg:height="0.437cm" svg:x="1.015cm" svg:y="2.097cm">
          <text:p text:style-name="P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19" draw:style-name="gr5" draw:text-style-name="P2" draw:layer="layout" svg:width="23.832cm" svg:height="10.628cm" svg:x="0.841cm" svg:y="2.534cm">
          <text:list text:style-name="L2">
            <text:list-item>
              <text:p text:style-name="P8"><text:span text:style-name="T8">Conçu pour s’exécuter de façon </text:span><text:span text:style-name="T9">autonome en production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CRON qui s’exécute à 6h00</text:span></text:p>
                </text:list-item>
                <text:list-item>
                  <text:p text:style-name="P8"><text:span text:style-name="T8">purge locale fichiers météo et hôtels des X jours précédents ou à moins X jours</text:span></text:p>
                </text:list-item>
              </text:list>
            </text:list-item>
            <text:list-item>
              <text:p text:style-name="P8"><text:span text:style-name="T9">Résilience</text:span></text:p>
              <text:list>
                <text:list-item>
                  <text:p text:style-name="P8"><text:span text:style-name="T9">cache JSON local</text:span><text:span text:style-name="T8"> pour les localisations des villes et résultats météo: pas d’appels redondants et évite d’envoyer des requêtes inutiles qui bloquerait l’accès à Nominatim ou OWM</text:span></text:p>
                </text:list-item>
                <text:list-item>
                  <text:p text:style-name="P8"><text:span text:style-name="T9">mécanismes de réessai</text:span><text:span text:style-name="T8"> avec backoff exponentiel et jitter sur les erreurs de requêtage (ex: 429, 5xx) vers Nominatim ou OWM</text:span></text:p>
                </text:list-item>
                <text:list-item>
                  <text:p text:style-name="P8"><text:span text:style-name="T9">idempotence</text:span><text:span text:style-name="T8"> : on vérifie les fichiers existants avant l’appel à l’API</text:span></text:p>
                </text:list-item>
              </text:list>
            </text:list-item>
            <text:list-item>
              <text:p text:style-name="P8"><text:span text:style-name="T9">Organisation et historisation</text:span></text:p>
              <text:list>
                <text:list-item>
                  <text:p text:style-name="P8"><text:span text:style-name="T9">répertoires de la forme ‘yyyyMMdd/’</text:span><text:span text:style-name="T8"> en local ou S3 + file naming patterns</text:span></text:p>
                </text:list-item>
                <text:list-item>
                  <text:p text:style-name="P8"><text:span text:style-name="T8">chaque exécution est indépendante de la précédente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19" draw:style-name="gr7" draw:text-style-name="P7" draw:layer="layout" svg:width="25.402cm" svg:height="0.999cm" svg:x="-0.002cm" svg:y="13.262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19" draw:style-name="gr5" draw:text-style-name="P2" draw:layer="layout" svg:width="23.484cm" svg:height="0.999cm" svg:x="1.015cm" svg:y="13.262cm">
          <text:p text:style-name="P4"><text:span text:style-name="T10">Jedha - Certification CDSD - Bloc 1 - Guillaume VIEL - 21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5;g3edf06be40a_0_32:notes" draw:style-name="gr6" draw:layer="layout" svg:width="16.932cm" svg:height="9.524cm" svg:x="1.059cm" svg:y="1.905cm" draw:page-number="7" presentation:class="page"/>
          <draw:frame draw:name="Google Shape;116;g3edf06be40a_0_32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LE_5f_AND_5f_BODY" presentation:presentation-page-layout-name="AL2T1">
        <draw:custom-shape draw:name="Google Shape;128;p20" draw:style-name="gr7" draw:text-style-name="P7" draw:layer="layout" svg:width="25.402cm" svg:height="1.999cm" svg:x="0cm" svg:y="0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20" draw:style-name="gr8" draw:text-style-name="P2" draw:layer="layout" svg:width="23.484cm" svg:height="1.999cm" svg:x="1.015cm" svg:y="0.007cm">
          <text:p text:style-name="P4"><text:span text:style-name="T6">Pipeline data : coûts de la solu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p20" draw:style-name="gr9" draw:text-style-name="P2" draw:layer="layout" svg:width="23.484cm" svg:height="0.232cm" svg:x="1.015cm" svg:y="2.097cm">
          <text:p text:style-name="P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p20" draw:style-name="gr5" draw:text-style-name="P2" draw:layer="layout" svg:width="23.832cm" svg:height="10.588cm" svg:x="0.667cm" svg:y="2.492cm">
          <text:list text:style-name="L2">
            <text:list-item>
              <text:p text:style-name="P8"><text:span text:style-name="T9">solution AWS RDS non retenue par rapport à Neon</text:span></text:p>
            </text:list-item>
            <text:list-item>
              <text:p text:style-name="P8"><text:span text:style-name="T9">déploiement sur cloud (AWS EC2, GCP, OVH?) à prévoir pour le pipelin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20" draw:style-name="gr7" draw:text-style-name="P7" draw:layer="layout" svg:width="25.402cm" svg:height="0.999cm" svg:x="-0.002cm" svg:y="13.262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20" draw:style-name="gr5" draw:text-style-name="P2" draw:layer="layout" svg:width="23.484cm" svg:height="0.999cm" svg:x="1.015cm" svg:y="13.262cm">
          <text:p text:style-name="P4"><text:span text:style-name="T10">Jedha - Certification CDSD - Bloc 1 - Guillaume VIEL - 21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4;p20" draw:style-name="standard" draw:layer="layout" svg:width="20.107cm" svg:height="7.433cm" svg:x="2.646cm" svg:y="5.027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<text:span text:style-name="T12">Source</text:span></text:p>
              </table:table-cell>
              <table:table-cell>
                <text:p text:style-name="P1"><text:span text:style-name="T12">Limites</text:span></text:p>
              </table:table-cell>
              <table:table-cell>
                <text:p text:style-name="P1"><text:span text:style-name="T12">Plan</text:span></text:p>
              </table:table-cell>
              <table:table-cell>
                <text:p text:style-name="P1"><text:span text:style-name="T12">Coûts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3">Nominatim</text:span></text:p>
              </table:table-cell>
              <table:table-cell>
                <text:p text:style-name="P1"><text:span text:style-name="T13">1 req / sec max</text:span></text:p>
              </table:table-cell>
              <table:table-cell>
                <text:p text:style-name="P1"><text:span text:style-name="T13">Gratuit</text:span></text:p>
              </table:table-cell>
              <table:table-cell>
                <text:p text:style-name="P1"><text:span text:style-name="T13">0€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3">OpenWeatherMap</text:span></text:p>
              </table:table-cell>
              <table:table-cell>
                <text:p text:style-name="P1"><text:span text:style-name="T13">1000 req/j max</text:span></text:p>
              </table:table-cell>
              <table:table-cell>
                <text:p text:style-name="P1"><text:span text:style-name="T13">Free tier</text:span></text:p>
              </table:table-cell>
              <table:table-cell>
                <text:p text:style-name="P1"><text:span text:style-name="T13">0€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3">AWS S3</text:span></text:p>
              </table:table-cell>
              <table:table-cell>
                <text:p text:style-name="P1"><text:span text:style-name="T13">5Go</text:span></text:p>
              </table:table-cell>
              <table:table-cell>
                <text:p text:style-name="P1"><text:span text:style-name="T13">pay-as-you-go</text:span></text:p>
              </table:table-cell>
              <table:table-cell>
                <text:p text:style-name="P1"><text:span text:style-name="T13">0€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3">Neon PostgreSQL</text:span></text:p>
              </table:table-cell>
              <table:table-cell>
                <text:p text:style-name="P1"><text:span text:style-name="T13">5 bdd</text:span></text:p>
              </table:table-cell>
              <table:table-cell>
                <text:p text:style-name="P1"><text:span text:style-name="T13">Serverless plan</text:span></text:p>
              </table:table-cell>
              <table:table-cell>
                <text:p text:style-name="P1"><text:span text:style-name="T13">0€</text:span></text:p>
              </table:table-cell>
            </table:table-row>
            <table:table-row table:style-name="ro1" table:default-cell-style-name="ce3">
              <table:table-cell>
                <text:p text:style-name="P1"><text:span text:style-name="T13">AWS RDS</text:span></text:p>
              </table:table-cell>
              <table:table-cell>
                <text:p text:style-name="P1"><text:span text:style-name="T13">-</text:span></text:p>
              </table:table-cell>
              <table:table-cell>
                <text:p text:style-name="P1"><text:span text:style-name="T13">pay-as-you-go</text:span></text:p>
              </table:table-cell>
              <table:table-cell>
                <text:p text:style-name="P1"><text:span text:style-name="T13">&gt;0€</text:span></text:p>
              </table:table-cell>
            </table:table-row>
            <table:table-row table:style-name="ro1" table:default-cell-style-name="ce3">
              <table:table-cell>
                <text:p text:style-name="P1"><text:span text:style-name="T13">Cloud server</text:span></text:p>
              </table:table-cell>
              <table:table-cell/>
              <table:table-cell>
                <text:p text:style-name="P1"><text:span text:style-name="T13">OVH?</text:span></text:p>
              </table:table-cell>
              <table:table-cell>
                <text:p text:style-name="P1"><text:span text:style-name="T13">&gt;0€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125;g3edf06be40a_0_41:notes" draw:style-name="gr6" draw:layer="layout" svg:width="16.932cm" svg:height="9.524cm" svg:x="1.059cm" svg:y="1.905cm" draw:page-number="8" presentation:class="page"/>
          <draw:frame draw:name="Google Shape;126;g3edf06be40a_0_41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ITLE_5f_AND_5f_BODY" presentation:presentation-page-layout-name="AL2T1">
        <draw:custom-shape draw:name="Google Shape;139;p21" draw:style-name="gr7" draw:text-style-name="P7" draw:layer="layout" svg:width="25.402cm" svg:height="1.999cm" svg:x="0cm" svg:y="0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21" draw:style-name="gr8" draw:text-style-name="P2" draw:layer="layout" svg:width="23.484cm" svg:height="1.999cm" svg:x="1.015cm" svg:y="0.007cm">
          <text:p text:style-name="P4"><text:span text:style-name="T6">Architecture détaillée de l’ET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21" draw:style-name="gr9" draw:text-style-name="P2" draw:layer="layout" svg:width="23.484cm" svg:height="0.999cm" svg:x="1.015cm" svg:y="2.097cm">
          <text:p text:style-name="P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1" draw:style-name="gr7" draw:text-style-name="P7" draw:layer="layout" svg:width="25.402cm" svg:height="0.999cm" svg:x="-0.002cm" svg:y="13.262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1" draw:style-name="gr5" draw:text-style-name="P2" draw:layer="layout" svg:width="23.484cm" svg:height="0.999cm" svg:x="1.015cm" svg:y="13.262cm">
          <text:p text:style-name="P4"><text:span text:style-name="T10">Jedha - Certification CDSD - Bloc 1 - Guillaume VIEL - 21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44;p21">
          <draw:custom-shape draw:name="Google Shape;145;p21" draw:style-name="gr10" draw:text-style-name="P10" draw:layer="layout" svg:width="9.181cm" svg:height="1.857cm" svg:x="15.645cm" svg:y="3.305cm">
            <text:p text:style-name="P1"><text:span text:style-name="T14">LOAD</text:span></text:p>
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Google Shape;146;p21" draw:style-name="gr5" draw:text-style-name="P2" draw:layer="layout" svg:width="7.957cm" svg:height="7.976cm" svg:x="16.659cm" svg:y="5.273cm">
            <text:list text:style-name="L12">
              <text:list-item>
                <text:p text:style-name="P11"><text:span text:style-name="T15">upload vers S3/{PREFIX}</text:span></text:p>
              </text:list-item>
            </text:list>
            <text:list text:style-name="L13">
              <text:list-item>
                <text:list>
                  <text:list-item>
                    <text:p text:style-name="P11"><text:span text:style-name="T15">cities.csv</text:span></text:p>
                  </text:list-item>
                  <text:list-item>
                    <text:p text:style-name="P11"><text:span text:style-name="T15">fichiers météo et hôtels du jour dans YYYYMMDD/</text:span></text:p>
                  </text:list-item>
                </text:list>
              </text:list-item>
              <text:list-item>
                <text:p text:style-name="P11"><text:span text:style-name="T15">stratégies d’upload BDD</text:span></text:p>
                <text:list>
                  <text:list-item>
                    <text:p text:style-name="P11"><text:span text:style-name="T15">replace pour cities</text:span></text:p>
                  </text:list-item>
                  <text:list-item>
                    <text:p text:style-name="P11"><text:span text:style-name="T15">replace pour les scores météo</text:span></text:p>
                  </text:list-item>
                  <text:list-item>
                    <text:p text:style-name="P11"><text:span text:style-name="T15">upsert pour les scores météo par jour</text:span></text:p>
                  </text:list-item>
                  <text:list-item>
                    <text:p text:style-name="P11"><text:span text:style-name="T15">merge + replace par plus récent pour les hôtels</text:span></text:p>
                  </text:list-item>
                </text:list>
              </text:list-item>
            </text:list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47;p21">
          <draw:custom-shape draw:name="Google Shape;148;p21" draw:style-name="gr11" draw:text-style-name="P12" draw:layer="layout" svg:width="9.852cm" svg:height="1.857cm" svg:x="-0.002cm" svg:y="3.305cm">
            <text:p text:style-name="P1"><text:span text:style-name="T14">EXTRACT</text:span></text:p>
            <draw:enhanced-geometry draw:mirror-horizontal="false" draw:mirror-vertical="false" draw:text-areas="0 0 ?f5 ?f8" svg:viewBox="0 0 0 0" draw:type="ooxml-homePlate" draw:modifiers="50000" draw:enhanced-path="M 0 0 L ?f4 0 ?f9 ?f7 ?f4 ?f8 0 ?f8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(?f4 +logwidth)/2"/>
              <draw:equation draw:name="f6" draw:formula="?f4 *1/2"/>
              <draw:equation draw:name="f7" draw:formula="logheight/2"/>
              <draw:equation draw:name="f8" draw:formula="logheight"/>
              <draw:equation draw:name="f9" draw:formula="logwidth"/>
              <draw:handle draw:handle-position="?f4 0" draw:handle-range-x-maximum="?f1" draw:handle-range-x-minimum="0"/>
            </draw:enhanced-geometry>
          </draw:custom-shape>
          <draw:custom-shape draw:name="Google Shape;149;p21" draw:style-name="gr5" draw:text-style-name="P2" draw:layer="layout" svg:width="7.317cm" svg:height="7.265cm" svg:x="0.695cm" svg:y="5.489cm">
            <text:p text:style-name="P13"><text:span text:style-name="T16">NOMINATIM</text:span><text:span text:style-name="T15"> : mise en cache json/cities/city-{city_id}.json</text:span></text:p>
            <text:p text:style-name="P13"><text:span text:style-name="T15"/></text:p>
            <text:p text:style-name="P13"><text:span text:style-name="T16">OWM</text:span><text:span text:style-name="T15"> : mise en cache weather/YYYYMMDD/weather-{city_id}-YYYYMMDD.json</text:span></text:p>
            <text:p text:style-name="P13"><text:span text:style-name="T15"/></text:p>
            <text:p text:style-name="P13"><text:span text:style-name="T15"/></text:p>
            <text:p text:style-name="P13"><text:span text:style-name="T15"/></text:p>
            <text:p text:style-name="P13"><text:span text:style-name="T16">Booking</text:span><text:span text:style-name="T15"> : mise en cache de html/{city_id}_liste.html (pour debug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50;p21">
          <draw:custom-shape draw:name="Google Shape;151;p21" draw:style-name="gr12" draw:text-style-name="P14" draw:layer="layout" svg:width="9.181cm" svg:height="1.857cm" svg:x="8.178cm" svg:y="3.305cm">
            <text:p text:style-name="P1"><text:span text:style-name="T14">TRANSFORM</text:span></text:p>
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Google Shape;152;p21" draw:style-name="gr5" draw:text-style-name="P2" draw:layer="layout" svg:width="7.46cm" svg:height="7.733cm" svg:x="9.116cm" svg:y="5.346cm">
            <text:p text:style-name="P13"><text:span text:style-name="T16">NOMINATIM</text:span><text:span text:style-name="T15"> : compilation des villes dans csv/cities.csv</text:span></text:p>
            <text:p text:style-name="P13"><text:span text:style-name="T15"/></text:p>
            <text:p text:style-name="P13"><text:span text:style-name="T16">OWM</text:span><text:span text:style-name="T15"> : csv/YYYYMMDD/weather-scores-YYYYMMDD.csv</text:span></text:p>
            <text:p text:style-name="P13"><text:span text:style-name="T15">csv/YYYYMMDD/weather-scores-daily-YYYYMMDD.csv</text:span></text:p>
            <text:p text:style-name="P13"><text:span text:style-name="T15"/></text:p>
            <text:p text:style-name="P13"><text:span text:style-name="T16">Booking</text:span><text:span text:style-name="T15"> : en même temps que l’extract csv/YYYYMMDD/hotels-{city_id}-YYYYMMDD.csv</text:span></text:p>
            <text:p text:style-name="P13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Google Shape;136;g3edf06be40a_0_50:notes" draw:style-name="gr6" draw:layer="layout" svg:width="16.932cm" svg:height="9.524cm" svg:x="1.059cm" svg:y="1.905cm" draw:page-number="9" presentation:class="page"/>
          <draw:frame draw:name="Google Shape;137;g3edf06be40a_0_50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ITLE_5f_AND_5f_BODY" presentation:presentation-page-layout-name="AL2T1">
        <draw:custom-shape draw:name="Google Shape;157;p22" draw:style-name="gr7" draw:text-style-name="P7" draw:layer="layout" svg:width="25.402cm" svg:height="1.999cm" svg:x="0cm" svg:y="0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;p22" draw:style-name="gr8" draw:text-style-name="P2" draw:layer="layout" svg:width="23.484cm" svg:height="1.999cm" svg:x="1.015cm" svg:y="0.007cm">
          <text:p text:style-name="P4"><text:span text:style-name="T6">Arborescence locale de stock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22" draw:style-name="gr9" draw:text-style-name="P2" draw:layer="layout" svg:width="23.484cm" svg:height="1.495cm" svg:x="1.015cm" svg:y="2.097cm">
          <text:p text:style-name="P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22" draw:style-name="gr5" draw:text-style-name="P2" draw:layer="layout" svg:width="23.832cm" svg:height="10.353cm" svg:x="0.783cm" svg:y="2.097cm">
          <text:p text:style-name="P4"><text:span text:style-name="T17">data/</text:span></text:p>
          <text:p text:style-name="P4"><text:span text:style-name="T17">│</text:span></text:p>
          <text:p text:style-name="P4"><text:span text:style-name="T17">├── </text:span><text:span text:style-name="T17">csv/</text:span></text:p>
          <text:p text:style-name="P4"><text:span text:style-name="T17">│ <text:s text:c="2"/>├── </text:span><text:span text:style-name="T17">cities.csv <text:s text:c="30"/>← référence villes (city_id, city_name, lat, lon)</text:span></text:p>
          <text:p text:style-name="P4"><text:span text:style-name="T17">│ <text:s text:c="2"/>│</text:span></text:p>
          <text:p text:style-name="P4"><text:span text:style-name="T17">│ <text:s text:c="2"/>└── </text:span><text:span text:style-name="T17">YYYYMMDD/ <text:s text:c="31"/>← un répertoire par jour d'extraction</text:span></text:p>
          <text:p text:style-name="P4"><text:span text:style-name="T17">│ <text:s text:c="6"/>├── </text:span><text:span text:style-name="T17">weather-scores-YYYYMMDD.csv <text:s text:c="9"/>← agrégat 4j par ville (score_final)</text:span></text:p>
          <text:p text:style-name="P4"><text:span text:style-name="T17">│ <text:s text:c="6"/>├── </text:span><text:span text:style-name="T17">weather-scores-daily-YYYYMMDD.csv <text:s text:c="3"/>← score par ville × jour</text:span></text:p>
          <text:p text:style-name="P4"><text:span text:style-name="T17">│ <text:s text:c="6"/>└── </text:span><text:span text:style-name="T17">hotels-{city_id}-YYYYMMDD.csv <text:s text:c="7"/>← un fichier par ville scrapée</text:span></text:p>
          <text:p text:style-name="P4"><text:span text:style-name="T17">│</text:span></text:p>
          <text:p text:style-name="P4"><text:span text:style-name="T17">├── </text:span><text:span text:style-name="T17">json/</text:span></text:p>
          <text:p text:style-name="P4"><text:span text:style-name="T17">│ <text:s text:c="2"/>├── </text:span><text:span text:style-name="T17">cities/</text:span></text:p>
          <text:p text:style-name="P4"><text:span text:style-name="T17">│ <text:s text:c="2"/>│ <text:s text:c="2"/>└── </text:span><text:span text:style-name="T17">city-{city_id}.json <text:s text:c="17"/>← cache Nominatim par ville (permanent)</text:span></text:p>
          <text:p text:style-name="P4"><text:span text:style-name="T17">│ <text:s text:c="2"/>│</text:span></text:p>
          <text:p text:style-name="P4"><text:span text:style-name="T17">│ <text:s text:c="2"/>└── </text:span><text:span text:style-name="T17">weather/</text:span></text:p>
          <text:p text:style-name="P4"><text:span text:style-name="T17">│ <text:s text:c="6"/>└── </text:span><text:span text:style-name="T17">YYYYMMDD/ <text:s text:c="27"/>← un répertoire par jour de prévision</text:span></text:p>
          <text:p text:style-name="P4"><text:span text:style-name="T17">│ <text:s text:c="10"/>└── </text:span><text:span text:style-name="T17">weather-{city_id}-YYYYMMDD.json <text:s/>← prévisions J+1 à J+4 (4 fichiers/ville)</text:span></text:p>
          <text:p text:style-name="P4"><text:span text:style-name="T17">│</text:span></text:p>
          <text:p text:style-name="P4"><text:span text:style-name="T17">└── </text:span><text:span text:style-name="T17">html/ <text:s text:c="39"/>← pages Booking.com (debug, purge &gt; 4j)</text:span></text:p>
          <text:p text:style-name="P4"><text:span text:style-name="T17"><text:s text:c="4"/>└── </text:span><text:span text:style-name="T17">{city_id}_liste.html</text:span></text:p>
          <text:p text:style-name="P4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22" draw:style-name="gr7" draw:text-style-name="P7" draw:layer="layout" svg:width="25.402cm" svg:height="0.999cm" svg:x="-0.002cm" svg:y="13.262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22" draw:style-name="gr5" draw:text-style-name="P2" draw:layer="layout" svg:width="23.484cm" svg:height="0.999cm" svg:x="1.015cm" svg:y="13.262cm">
          <text:p text:style-name="P4"><text:span text:style-name="T10">Jedha - Certification CDSD - Bloc 1 - Guillaume VIEL - 21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4;g3edf06be40a_0_59:notes" draw:style-name="gr6" draw:layer="layout" svg:width="16.932cm" svg:height="9.524cm" svg:x="1.059cm" svg:y="1.905cm" draw:page-number="10" presentation:class="page"/>
          <draw:frame draw:name="Google Shape;155;g3edf06be40a_0_59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TITLE_5f_AND_5f_BODY" presentation:presentation-page-layout-name="AL2T1">
        <draw:custom-shape draw:name="Google Shape;167;p23" draw:style-name="gr7" draw:text-style-name="P7" draw:layer="layout" svg:width="25.402cm" svg:height="1.999cm" svg:x="0cm" svg:y="0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3" draw:style-name="gr8" draw:text-style-name="P2" draw:layer="layout" svg:width="23.484cm" svg:height="1.999cm" svg:x="1.015cm" svg:y="0.007cm">
          <text:p text:style-name="P4"><text:span text:style-name="T6">Arborescence data lake S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3" draw:style-name="gr9" draw:text-style-name="P2" draw:layer="layout" svg:width="23.484cm" svg:height="0.999cm" svg:x="0.958cm" svg:y="2.007cm">
          <text:p text:style-name="P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23" draw:style-name="gr5" draw:text-style-name="P2" draw:layer="layout" svg:width="23.832cm" svg:height="9.789cm" svg:x="0.783cm" svg:y="3.321cm">
          <text:p text:style-name="P4"><text:span text:style-name="T18">s3://&lt;S3_BUCKET&gt;/</text:span></text:p>
          <text:p text:style-name="P4"><text:span text:style-name="T18">│</text:span></text:p>
          <text:p text:style-name="P4"><text:span text:style-name="T18">└── </text:span><text:span text:style-name="T18">csv/ <text:s text:c="40"/>← S3_PREFIX (défaut : "csv/")</text:span></text:p>
          <text:p text:style-name="P4"><text:span text:style-name="T18"><text:s text:c="4"/>│</text:span></text:p>
          <text:p text:style-name="P4"><text:span text:style-name="T18"><text:s text:c="4"/>├── </text:span><text:span text:style-name="T18">cities.csv <text:s text:c="30"/>← référence villes (pas de date)</text:span></text:p>
          <text:p text:style-name="P4"><text:span text:style-name="T18"><text:s text:c="4"/>│</text:span></text:p>
          <text:p text:style-name="P4"><text:span text:style-name="T18"><text:s text:c="4"/>└── </text:span><text:span text:style-name="T18">YYYYMMDD/ <text:s text:c="31"/>← un répertoire par jour d'extraction</text:span></text:p>
          <text:p text:style-name="P4"><text:span text:style-name="T18"><text:s text:c="8"/>├── </text:span><text:span text:style-name="T18">weather-scores-YYYYMMDD.csv <text:s text:c="9"/>← agrégat 4j par ville (score_final)</text:span></text:p>
          <text:p text:style-name="P4"><text:span text:style-name="T18"><text:s text:c="8"/>├── </text:span><text:span text:style-name="T18">weather-scores-daily-YYYYMMDD.csv <text:s text:c="3"/>← score par ville × jour (pour la courbe de suivi des scores)</text:span></text:p>
          <text:p text:style-name="P4"><text:span text:style-name="T18"><text:s text:c="8"/>└── </text:span><text:span text:style-name="T18">hotels-{city_id}-YYYYMMDD.csv <text:s text:c="7"/>← un fichier par ville scrapée</text:span></text:p>
          <text:p text:style-name="P4"><text:span text:style-name="T18"/></text:p>
          <text:p text:style-name="P4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23" draw:style-name="gr7" draw:text-style-name="P7" draw:layer="layout" svg:width="25.402cm" svg:height="0.999cm" svg:x="-0.002cm" svg:y="13.262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2;p23" draw:style-name="gr5" draw:text-style-name="P2" draw:layer="layout" svg:width="23.484cm" svg:height="0.999cm" svg:x="1.015cm" svg:y="13.262cm">
          <text:p text:style-name="P4"><text:span text:style-name="T10">Jedha - Certification CDSD - Bloc 1 - Guillaume VIEL - 21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4;g3edf06be40a_0_68:notes" draw:style-name="gr6" draw:layer="layout" svg:width="16.932cm" svg:height="9.524cm" svg:x="1.059cm" svg:y="1.905cm" draw:page-number="11" presentation:class="page"/>
          <draw:frame draw:name="Google Shape;165;g3edf06be40a_0_68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TITLE_5f_AND_5f_BODY" presentation:presentation-page-layout-name="AL2T1">
        <draw:custom-shape draw:name="Google Shape;177;p24" draw:style-name="gr7" draw:text-style-name="P7" draw:layer="layout" svg:width="25.402cm" svg:height="1.999cm" svg:x="0cm" svg:y="0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8;p24" draw:style-name="gr8" draw:text-style-name="P2" draw:layer="layout" svg:width="23.484cm" svg:height="1.999cm" svg:x="0.958cm" svg:y="0cm">
          <text:p text:style-name="P4"><text:span text:style-name="T6">Schéma du data warehou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9;p24" draw:style-name="gr9" draw:text-style-name="P2" draw:layer="layout" svg:width="23.484cm" svg:height="1.495cm" svg:x="0.841cm" svg:y="2cm">
          <text:p text:style-name="P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0;p24" draw:style-name="gr5" draw:text-style-name="P2" draw:layer="layout" svg:width="23.832cm" svg:height="8.767cm" svg:x="0.841cm" svg:y="3.781cm">
          <text:p text:style-name="P4"><text:span text:style-name="T9">5 tables PostgreSQL :</text:span><text:span text:style-name="T9"><text:line-break/></text:span><text:span text:style-name="T9"/></text:p>
          <text:list text:style-name="L2">
            <text:list-item>
              <text:p text:style-name="P4"><text:span text:style-name="T9">history</text:span><text:span text:style-name="T8"> : contient la date de chargement de chacune des tables</text:span></text:p>
            </text:list-item>
            <text:list-item>
              <text:p text:style-name="P4"><text:span text:style-name="T9">cities</text:span><text:span text:style-name="T8"> : contient les données Nominatim</text:span></text:p>
            </text:list-item>
            <text:list-item>
              <text:p text:style-name="P4"><text:span text:style-name="T9">weather_scores</text:span><text:span text:style-name="T8"> : les scores calculés pour le jour J</text:span></text:p>
            </text:list-item>
            <text:list-item>
              <text:p text:style-name="P4"><text:span text:style-name="T9">weather_scores_daily</text:span><text:span text:style-name="T8"> : pour avoir un historique des scores détaillés</text:span></text:p>
            </text:list-item>
            <text:list-item>
              <text:p text:style-name="P4"><text:span text:style-name="T9">hotels</text:span><text:span text:style-name="T8"> : les données relatives des hôtel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p24" draw:style-name="gr7" draw:text-style-name="P7" draw:layer="layout" svg:width="25.402cm" svg:height="0.999cm" svg:x="-0.002cm" svg:y="13.262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24" draw:style-name="gr5" draw:text-style-name="P2" draw:layer="layout" svg:width="23.484cm" svg:height="0.999cm" svg:x="1.015cm" svg:y="13.262cm">
          <text:p text:style-name="P4"><text:span text:style-name="T10">Jedha - Certification CDSD - Bloc 1 - Guillaume VIEL - 21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4;g3edf06be40a_0_325:notes" draw:style-name="gr6" draw:layer="layout" svg:width="16.932cm" svg:height="9.524cm" svg:x="1.059cm" svg:y="1.905cm" draw:page-number="12" presentation:class="page"/>
          <draw:frame draw:name="Google Shape;175;g3edf06be40a_0_325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TITLE_5f_AND_5f_BODY" presentation:presentation-page-layout-name="AL2T1">
        <draw:custom-shape draw:name="Google Shape;187;p25" draw:style-name="gr7" draw:text-style-name="P7" draw:layer="layout" svg:width="25.402cm" svg:height="1.999cm" svg:x="0cm" svg:y="0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25" draw:style-name="gr8" draw:text-style-name="P2" draw:layer="layout" svg:width="23.484cm" svg:height="1.999cm" svg:x="0.958cm" svg:y="-0.092cm">
          <text:p text:style-name="P4"><text:span text:style-name="T6">Dashboard en production (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9;p25" draw:style-name="gr5" draw:text-style-name="P2" draw:layer="layout" svg:width="23.484cm" svg:height="1.999cm" svg:x="1.015cm" svg:y="2.097cm">
          <text:p text:style-name="P4"><text:span text:style-name="T11"><text:a xlink:href="https://jedha-project-02-kayak-4kzhtcxgjjwncdsldqjdmq.streamlit.app/" xlink:type="simple">https://jedha-project-02-kayak-4kzhtcxgjjwncdsldqjdmq.streamlit.app/</text:a></text:span></text:p>
          <text:p text:style-name="P4"><text:span text:style-name="T19">Carte interactive des destinations avec les 5 premiers dans le tableau à droi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0;p25" draw:style-name="gr9" draw:text-style-name="P2" draw:layer="layout" svg:width="12.178cm" svg:height="8.767cm" svg:x="0.841cm" svg:y="3.781cm">
          <text:p text:style-name="P4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1;p25" draw:style-name="gr7" draw:text-style-name="P7" draw:layer="layout" svg:width="25.402cm" svg:height="0.999cm" svg:x="-0.002cm" svg:y="13.262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2;p25" draw:style-name="gr5" draw:text-style-name="P2" draw:layer="layout" svg:width="23.484cm" svg:height="0.999cm" svg:x="1.015cm" svg:y="13.262cm">
          <text:p text:style-name="P4"><text:span text:style-name="T10">Jedha - Certification CDSD - Bloc 1 - Guillaume VIEL - 21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3;p25" draw:style-name="gr2" draw:text-style-name="P3" draw:layer="layout" svg:width="25.399cm" svg:height="8.896cm" svg:x="0cm" svg:y="4.371cm">
          <draw:image xlink:href="Pictures/10000201000006B100000258EE9AB27FD7845639.png" xlink:type="simple" xlink:show="embed" xlink:actuate="onLoad">
            <text:p/>
          </draw:image>
        </draw:frame>
        <presentation:notes draw:style-name="dp2">
          <draw:page-thumbnail draw:name="Google Shape;184;g3edf06be40a_0_334:notes" draw:style-name="gr6" draw:layer="layout" svg:width="16.932cm" svg:height="9.524cm" svg:x="1.059cm" svg:y="1.905cm" draw:page-number="13" presentation:class="page"/>
          <draw:frame draw:name="Google Shape;185;g3edf06be40a_0_334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TITLE_5f_AND_5f_BODY" presentation:presentation-page-layout-name="AL2T1">
        <draw:custom-shape draw:name="Google Shape;198;p26" draw:style-name="gr7" draw:text-style-name="P7" draw:layer="layout" svg:width="25.402cm" svg:height="1.999cm" svg:x="0cm" svg:y="0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9;p26" draw:style-name="gr8" draw:text-style-name="P2" draw:layer="layout" svg:width="23.484cm" svg:height="1.999cm" svg:x="1.015cm" svg:y="0.007cm">
          <text:p text:style-name="P4"><text:span text:style-name="T6">Dashboard en production (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0;p26" draw:style-name="gr5" draw:text-style-name="P2" draw:layer="layout" svg:width="23.484cm" svg:height="1.495cm" svg:x="1.015cm" svg:y="2.097cm">
          <text:p text:style-name="P4"><text:span text:style-name="T19">Carte interactive des hôtels (et popup) avec tableau à droite pour les inf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1;p26" draw:style-name="gr7" draw:text-style-name="P7" draw:layer="layout" svg:width="25.402cm" svg:height="0.999cm" svg:x="-0.002cm" svg:y="13.262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2;p26" draw:style-name="gr5" draw:text-style-name="P2" draw:layer="layout" svg:width="23.484cm" svg:height="0.999cm" svg:x="1.015cm" svg:y="13.262cm">
          <text:p text:style-name="P4"><text:span text:style-name="T10">Jedha - Certification CDSD - Bloc 1 - Guillaume VIEL - 21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3;p26" draw:style-name="gr2" draw:text-style-name="P3" draw:layer="layout" svg:width="24.552cm" svg:height="7.501cm" svg:x="0.423cm" svg:y="4.016cm">
          <draw:image xlink:href="Pictures/10000201000006C00000021098CC7703AA091F68.png" xlink:type="simple" xlink:show="embed" xlink:actuate="onLoad">
            <text:p/>
          </draw:image>
        </draw:frame>
        <presentation:notes draw:style-name="dp2">
          <draw:page-thumbnail draw:name="Google Shape;195;g3edf06be40a_0_343:notes" draw:style-name="gr6" draw:layer="layout" svg:width="16.932cm" svg:height="9.524cm" svg:x="1.059cm" svg:y="1.905cm" draw:page-number="14" presentation:class="page"/>
          <draw:frame draw:name="Google Shape;196;g3edf06be40a_0_343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TITLE_5f_AND_5f_BODY" presentation:presentation-page-layout-name="AL2T1">
        <draw:custom-shape draw:name="Google Shape;208;p27" draw:style-name="gr7" draw:text-style-name="P7" draw:layer="layout" svg:width="25.402cm" svg:height="1.999cm" svg:x="0cm" svg:y="0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27" draw:style-name="gr8" draw:text-style-name="P2" draw:layer="layout" svg:width="23.484cm" svg:height="1.999cm" svg:x="1.015cm" svg:y="0.007cm">
          <text:p text:style-name="P4"><text:span text:style-name="T6">Difficultés ou limitations rencontré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27" draw:style-name="gr9" draw:text-style-name="P2" draw:layer="layout" svg:width="23.484cm" svg:height="1.495cm" svg:x="1.015cm" svg:y="2.097cm">
          <text:p text:style-name="P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;p27" draw:style-name="gr5" draw:text-style-name="P2" draw:layer="layout" svg:width="23.832cm" svg:height="8.767cm" svg:x="0.841cm" svg:y="3.781cm">
          <text:list text:style-name="L2">
            <text:list-item>
              <text:p text:style-name="P8"><text:span text:style-name="T9">Nominatim</text:span><text:span text:style-name="T8"> : limitation du nombre de requêtes -&gt; cache + pause</text:span></text:p>
            </text:list-item>
            <text:list-item>
              <text:p text:style-name="P8"><text:span text:style-name="T9">OpenWeatherMap</text:span><text:span text:style-name="T8"> : limitation à 4j + gestion d’erreurs API + choix des données</text:span></text:p>
            </text:list-item>
            <text:list-item>
              <text:p text:style-name="P8"><text:span text:style-name="T9">Modèle de scoring météo</text:span><text:span text:style-name="T8"> : choix des données et des agrégations pour le modèle</text:span></text:p>
            </text:list-item>
            <text:list-item>
              <text:p text:style-name="P8"><text:span text:style-name="T9">Scraping booking.com</text:span><text:span text:style-name="T8"> : un anti-bot agressif qui a nécessité une bascule de scrapy vers Playwright pour mieux simuler le comportement d’un humain (délais de clic, fermeture popups)</text:span></text:p>
            </text:list-item>
            <text:list-item>
              <text:p text:style-name="P8"><text:span text:style-name="T9">Architecture autonome</text:span><text:span text:style-name="T8"> : pas de Notebook, scripts indépendants, déploiement sous forme d’un pipeline quotidie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2;p27" draw:style-name="gr7" draw:text-style-name="P7" draw:layer="layout" svg:width="25.402cm" svg:height="0.999cm" svg:x="-0.002cm" svg:y="13.262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3;p27" draw:style-name="gr5" draw:text-style-name="P2" draw:layer="layout" svg:width="23.484cm" svg:height="0.999cm" svg:x="1.015cm" svg:y="13.262cm">
          <text:p text:style-name="P4"><text:span text:style-name="T10">Jedha - Certification CDSD - Bloc 1 - Guillaume VIEL - 21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5;g3edf06be40a_0_355:notes" draw:style-name="gr6" draw:layer="layout" svg:width="16.932cm" svg:height="9.524cm" svg:x="1.059cm" svg:y="1.905cm" draw:page-number="15" presentation:class="page"/>
          <draw:frame draw:name="Google Shape;206;g3edf06be40a_0_355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TITLE_5f_AND_5f_BODY" presentation:presentation-page-layout-name="AL2T1">
        <draw:custom-shape draw:name="Google Shape;218;p28" draw:style-name="gr7" draw:text-style-name="P7" draw:layer="layout" svg:width="25.402cm" svg:height="1.999cm" svg:x="0cm" svg:y="0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9;p28" draw:style-name="gr8" draw:text-style-name="P2" draw:layer="layout" svg:width="23.484cm" svg:height="1.999cm" svg:x="1.015cm" svg:y="0.007cm">
          <text:p text:style-name="P4"><text:span text:style-name="T6">Améliorations possib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0;p28" draw:style-name="gr9" draw:text-style-name="P2" draw:layer="layout" svg:width="23.484cm" svg:height="1.495cm" svg:x="1.015cm" svg:y="2.097cm">
          <text:p text:style-name="P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1;p28" draw:style-name="gr5" draw:text-style-name="P2" draw:layer="layout" svg:width="23.832cm" svg:height="8.767cm" svg:x="0.783cm" svg:y="3.683cm">
          <text:list text:style-name="L2">
            <text:list-item>
              <text:p text:style-name="P8"><text:span text:style-name="T9">Utiliser un orchestrateur de pipeline :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9">Airflow ou Jenkins</text:span></text:p>
                </text:list-item>
              </text:list>
            </text:list-item>
            <text:list-item>
              <text:p text:style-name="P8"><text:span text:style-name="T9">Interface web pour téléphones mobiles</text:span></text:p>
              <text:list>
                <text:list-item>
                  <text:p text:style-name="P8"><text:span text:style-name="T9">par exemple avec une stack Nextjs / Typescript / Boostrap CSS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2;p28" draw:style-name="gr7" draw:text-style-name="P7" draw:layer="layout" svg:width="25.402cm" svg:height="0.999cm" svg:x="-0.002cm" svg:y="13.262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3;p28" draw:style-name="gr5" draw:text-style-name="P2" draw:layer="layout" svg:width="23.484cm" svg:height="0.999cm" svg:x="1.015cm" svg:y="13.262cm">
          <text:p text:style-name="P4"><text:span text:style-name="T10">Jedha - Certification CDSD - Bloc 1 - Guillaume VIEL - 21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5;g3edf06be40a_0_364:notes" draw:style-name="gr6" draw:layer="layout" svg:width="16.932cm" svg:height="9.524cm" svg:x="1.059cm" svg:y="1.905cm" draw:page-number="16" presentation:class="page"/>
          <draw:frame draw:name="Google Shape;216;g3edf06be40a_0_364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" presentation:presentation-page-layout-name="AL1T0">
        <draw:custom-shape draw:name="Google Shape;228;p29" draw:style-name="gr1" draw:text-style-name="P2" draw:layer="layout" svg:width="23.499cm" svg:height="1.778cm" svg:x="1cm" svg:y="4.448cm">
          <text:p text:style-name="P1"><text:span text:style-name="T1">Questions 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9;p29" draw:style-name="gr1" draw:text-style-name="P2" draw:layer="layout" svg:width="15.53cm" svg:height="2.751cm" svg:x="1cm" svg:y="0.536cm">
          <text:p text:style-name="P4"><text:span text:style-name="T1">Jedha - Data Science Fullstack</text:span></text:p>
          <text:p text:style-name="P4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0;p29" draw:style-name="gr1" draw:text-style-name="P2" draw:layer="layout" svg:width="23.499cm" svg:height="1.185cm" svg:x="1cm" svg:y="1.922cm">
          <text:p text:style-name="P4"><text:span text:style-name="T3"><text:s/></text:span><text:span text:style-name="T3">Certification CSCD (Concepteur développeur en science des donnée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1;p29" draw:style-name="gr2" draw:text-style-name="P3" draw:layer="layout" svg:width="1.602cm" svg:height="1.09cm" svg:x="22.898cm" svg:y="1cm">
          <draw:image xlink:href="Pictures/100002010000008D000000609DFC021226D1E325.png" xlink:type="simple" xlink:show="embed" xlink:actuate="onLoad">
            <text:p/>
          </draw:image>
        </draw:frame>
        <draw:custom-shape draw:name="Google Shape;232;p29" draw:style-name="gr3" draw:text-style-name="P3" draw:layer="layout" svg:width="23.496cm" svg:height="0.001cm" svg:x="1.015cm" svg:y="3.1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3;p29" draw:style-name="gr5" draw:text-style-name="P2" draw:layer="layout" svg:width="23.689cm" svg:height="0.716cm" svg:x="0.81cm" svg:y="13.178cm">
          <text:p text:style-name="P4"><text:span text:style-name="T5">Guillaume VIEL - 21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5;g3edf06be40a_0_383:notes" draw:style-name="gr6" draw:layer="layout" svg:width="16.932cm" svg:height="9.524cm" svg:x="1.059cm" svg:y="1.905cm" draw:page-number="17" presentation:class="page"/>
          <draw:frame draw:name="Google Shape;226;g3edf06be40a_0_383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Roboto" svg:font-family="Roboto"/>
    <style:font-face style:name="Roboto Light" svg:font-family="'Roboto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78"/>
    <meta:generator>LibreOfficeDev/6.0.5.2$Linux_X86_64 LibreOffice_project/</meta:generator>
  </office:meta>
</office:document-meta>
</file>